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A5000000E0DE200F74.png" manifest:media-type="image/png"/>
  <manifest:file-entry manifest:full-path="Pictures/100000010000024B000001E834B27B6A.png" manifest:media-type="image/png"/>
  <manifest:file-entry manifest:full-path="Pictures/10000001000002AD000000B9C554E9D6.png" manifest:media-type="image/png"/>
  <manifest:file-entry manifest:full-path="Pictures/1000000100000231000000DF8339B09E.png" manifest:media-type="image/png"/>
  <manifest:file-entry manifest:full-path="Pictures/100000010000045000000272AAC3D83B.png" manifest:media-type="image/png"/>
  <manifest:file-entry manifest:full-path="Pictures/100000010000028F000000D8F5869DDB.png" manifest:media-type="image/png"/>
  <manifest:file-entry manifest:full-path="Pictures/10000001000003DE000003EDC586C60B.png" manifest:media-type="image/png"/>
  <manifest:file-entry manifest:full-path="Pictures/1000000100000166000000AD8E8F53FE.png" manifest:media-type="image/png"/>
  <manifest:file-entry manifest:full-path="Pictures/1000000100000404000002F8D95413E4.png" manifest:media-type="image/png"/>
  <manifest:file-entry manifest:full-path="Pictures/1000000100000403000002F9E228199A.png" manifest:media-type="image/png"/>
  <manifest:file-entry manifest:full-path="Pictures/10000001000000DA0000009A3EFD32E7.png" manifest:media-type="image/png"/>
  <manifest:file-entry manifest:full-path="Pictures/1000000100000401000002F4935BAA2B.png" manifest:media-type="image/png"/>
  <manifest:file-entry manifest:full-path="Pictures/10000001000004200000012CC6057B19.png" manifest:media-type="image/png"/>
  <manifest:file-entry manifest:full-path="Pictures/1000000100000404000002F7F5CC469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e81e7" officeooo:paragraph-rsid="000e81e7" fo:background-color="#ffff00" style:font-size-asian="20pt" style:font-weight-asian="bold" style:font-size-complex="20pt" style:font-weight-complex="bold"/>
    </style:style>
    <style:style style:name="P2" style:family="paragraph" style:parent-style-name="Standard">
      <style:text-properties officeooo:rsid="000e81e7" officeooo:paragraph-rsid="000e81e7"/>
    </style:style>
    <style:style style:name="P3" style:family="paragraph" style:parent-style-name="Standard">
      <style:paragraph-properties fo:text-align="justify" style:justify-single-word="false"/>
      <style:text-properties officeooo:rsid="000e81e7" officeooo:paragraph-rsid="000e81e7"/>
    </style:style>
    <style:style style:name="P4" style:family="paragraph" style:parent-style-name="Standard">
      <style:paragraph-properties fo:text-align="justify" style:justify-single-word="false"/>
      <style:text-properties fo:font-weight="bold" officeooo:rsid="000e81e7" officeooo:paragraph-rsid="000e81e7" style:font-weight-asian="bold" style:font-weight-complex="bold"/>
    </style:style>
    <style:style style:name="P5" style:family="paragraph" style:parent-style-name="Standard">
      <style:paragraph-properties fo:text-align="justify" style:justify-single-word="false"/>
      <style:text-properties fo:font-weight="bold" officeooo:rsid="000f1f2b" officeooo:paragraph-rsid="000e81e7" style:font-weight-asian="bold" style:font-weight-complex="bold"/>
    </style:style>
    <style:style style:name="P6" style:family="paragraph" style:parent-style-name="Standard">
      <style:paragraph-properties fo:text-align="justify" style:justify-single-word="false"/>
      <style:text-properties fo:font-weight="normal" officeooo:rsid="000e81e7" officeooo:paragraph-rsid="000e81e7" style:font-weight-asian="normal" style:font-weight-complex="normal"/>
    </style:style>
    <style:style style:name="P7" style:family="paragraph" style:parent-style-name="Standard">
      <style:paragraph-properties fo:text-align="justify" style:justify-single-word="false"/>
      <style:text-properties fo:font-weight="normal" officeooo:rsid="000e81e7" officeooo:paragraph-rsid="000f1f2b" style:font-weight-asian="normal" style:font-weight-complex="normal"/>
    </style:style>
    <style:style style:name="P8" style:family="paragraph" style:parent-style-name="Standard">
      <style:paragraph-properties fo:text-align="justify" style:justify-single-word="false"/>
      <style:text-properties fo:font-weight="bold" officeooo:rsid="000f1f2b" officeooo:paragraph-rsid="001083e4" style:font-weight-asian="bold" style:font-weight-complex="bold"/>
    </style:style>
    <style:style style:name="P9" style:family="paragraph" style:parent-style-name="Standard">
      <style:paragraph-properties fo:text-align="justify" style:justify-single-word="false"/>
      <style:text-properties fo:font-weight="normal" officeooo:rsid="000e81e7" officeooo:paragraph-rsid="001083e4" style:font-weight-asian="normal" style:font-weight-complex="normal"/>
    </style:style>
    <style:style style:name="P10" style:family="paragraph" style:parent-style-name="Standard">
      <style:paragraph-properties fo:text-align="justify" style:justify-single-word="false"/>
      <style:text-properties fo:font-style="italic" fo:font-weight="normal" officeooo:rsid="000f1f2b" officeooo:paragraph-rsid="001083e4"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weight="normal" officeooo:rsid="000f1f2b" officeooo:paragraph-rsid="000f1f2b" style:font-weight-asian="normal" style:font-weight-complex="normal"/>
    </style:style>
    <style:style style:name="P12" style:family="paragraph" style:parent-style-name="Standard">
      <style:paragraph-properties fo:text-align="justify" style:justify-single-word="false"/>
      <style:text-properties fo:font-weight="bold" officeooo:rsid="00115ab5" officeooo:paragraph-rsid="00115ab5" style:font-weight-asian="bold" style:font-weight-complex="bold"/>
    </style:style>
    <style:style style:name="P13" style:family="paragraph" style:parent-style-name="Standard">
      <style:paragraph-properties fo:text-align="justify" style:justify-single-word="false"/>
      <style:text-properties fo:font-weight="normal" officeooo:rsid="000e81e7" officeooo:paragraph-rsid="00115ab5" style:font-weight-asian="normal" style:font-weight-complex="normal"/>
    </style:style>
    <style:style style:name="P14" style:family="paragraph" style:parent-style-name="Standard">
      <style:paragraph-properties fo:text-align="justify" style:justify-single-word="false"/>
      <style:text-properties fo:font-weight="bold" officeooo:rsid="0012a1c4" officeooo:paragraph-rsid="0012a1c4" style:font-weight-asian="bold" style:font-weight-complex="bold"/>
    </style:style>
    <style:style style:name="P15" style:family="paragraph" style:parent-style-name="Standard">
      <style:paragraph-properties fo:text-align="justify" style:justify-single-word="false"/>
      <style:text-properties fo:font-weight="normal" officeooo:rsid="00115ab5" officeooo:paragraph-rsid="00115ab5" style:font-weight-asian="normal" style:font-weight-complex="normal"/>
    </style:style>
    <style:style style:name="P16" style:family="paragraph" style:parent-style-name="Standard">
      <style:paragraph-properties fo:text-align="justify" style:justify-single-word="false"/>
      <style:text-properties fo:font-weight="bold" officeooo:rsid="0021de8c" officeooo:paragraph-rsid="0012a1c4" style:font-weight-asian="bold" style:font-weight-complex="bold"/>
    </style:style>
    <style:style style:name="P17" style:family="paragraph" style:parent-style-name="Standard">
      <style:paragraph-properties fo:text-align="justify" style:justify-single-word="false"/>
      <style:text-properties fo:font-weight="normal" officeooo:rsid="000e81e7" officeooo:paragraph-rsid="0012a1c4" style:font-weight-asian="normal" style:font-weight-complex="normal"/>
    </style:style>
    <style:style style:name="P18" style:family="paragraph" style:parent-style-name="Standard">
      <style:paragraph-properties fo:text-align="justify" style:justify-single-word="false"/>
      <style:text-properties fo:font-weight="bold" officeooo:rsid="00146395" officeooo:paragraph-rsid="00146395" style:font-weight-asian="bold" style:font-weight-complex="bold"/>
    </style:style>
    <style:style style:name="P19" style:family="paragraph" style:parent-style-name="Standard">
      <style:paragraph-properties fo:text-align="justify" style:justify-single-word="false"/>
      <style:text-properties fo:font-weight="bold" officeooo:rsid="00146395" officeooo:paragraph-rsid="0021de8c" style:font-weight-asian="bold" style:font-weight-complex="bold"/>
    </style:style>
    <style:style style:name="P20" style:family="paragraph" style:parent-style-name="Standard">
      <style:paragraph-properties fo:text-align="justify" style:justify-single-word="false"/>
      <style:text-properties fo:font-weight="normal" officeooo:rsid="00146395" officeooo:paragraph-rsid="0016cdd0" style:font-weight-asian="normal" style:font-weight-complex="normal"/>
    </style:style>
    <style:style style:name="P21" style:family="paragraph" style:parent-style-name="Standard">
      <style:paragraph-properties fo:text-align="justify" style:justify-single-word="false"/>
      <style:text-properties fo:font-weight="bold" officeooo:rsid="00146395" officeooo:paragraph-rsid="001fe037" style:font-weight-asian="bold" style:font-weight-complex="bold"/>
    </style:style>
    <style:style style:name="P22" style:family="paragraph" style:parent-style-name="Standard">
      <style:paragraph-properties fo:text-align="justify" style:justify-single-word="false"/>
      <style:text-properties fo:font-weight="normal" officeooo:rsid="00167629" officeooo:paragraph-rsid="001fe037" style:font-weight-asian="normal" style:font-weight-complex="normal"/>
    </style:style>
    <style:style style:name="P23" style:family="paragraph" style:parent-style-name="Standard">
      <style:paragraph-properties fo:text-align="justify" style:justify-single-word="false"/>
      <style:text-properties fo:font-weight="normal" officeooo:rsid="00167629" officeooo:paragraph-rsid="00185f38" style:font-weight-asian="normal" style:font-weight-complex="normal"/>
    </style:style>
    <style:style style:name="P24" style:family="paragraph" style:parent-style-name="Standard">
      <style:paragraph-properties fo:text-align="justify" style:justify-single-word="false"/>
      <style:text-properties fo:font-weight="normal" officeooo:rsid="00185f38" officeooo:paragraph-rsid="00185f38" style:font-weight-asian="normal" style:font-weight-complex="normal"/>
    </style:style>
    <style:style style:name="P25" style:family="paragraph" style:parent-style-name="Standard">
      <style:paragraph-properties fo:text-align="justify" style:justify-single-word="false"/>
      <style:text-properties fo:font-weight="normal" officeooo:rsid="0019e990" officeooo:paragraph-rsid="0031e979" style:font-weight-asian="normal" style:font-weight-complex="normal"/>
    </style:style>
    <style:style style:name="P26" style:family="paragraph" style:parent-style-name="Standard">
      <style:paragraph-properties fo:text-align="justify" style:justify-single-word="false"/>
      <style:text-properties fo:font-weight="normal" officeooo:rsid="0019e990" officeooo:paragraph-rsid="0019e990" style:font-weight-asian="normal" style:font-weight-complex="normal"/>
    </style:style>
    <style:style style:name="P27" style:family="paragraph" style:parent-style-name="Standard">
      <style:paragraph-properties fo:text-align="justify" style:justify-single-word="false"/>
      <style:text-properties fo:font-weight="normal" officeooo:rsid="00308864" officeooo:paragraph-rsid="00308864" style:font-weight-asian="normal" style:font-weight-complex="normal"/>
    </style:style>
    <style:style style:name="P28" style:family="paragraph" style:parent-style-name="Standard">
      <style:paragraph-properties fo:text-align="justify" style:justify-single-word="false"/>
      <style:text-properties fo:font-weight="bold" officeooo:rsid="00308864" officeooo:paragraph-rsid="00308864" style:font-weight-asian="bold" style:font-weight-complex="bold"/>
    </style:style>
    <style:style style:name="T1" style:family="text">
      <style:text-properties fo:font-weight="bold" style:font-weight-asian="bold" style:font-weight-complex="bold"/>
    </style:style>
    <style:style style:name="T2" style:family="text">
      <style:text-properties officeooo:rsid="00281ee5"/>
    </style:style>
    <style:style style:name="T3" style:family="text">
      <style:text-properties officeooo:rsid="00299b18"/>
    </style:style>
    <style:style style:name="T4" style:family="text">
      <style:text-properties officeooo:rsid="003f8c79"/>
    </style:style>
    <style:style style:name="T5" style:family="text">
      <style:text-properties officeooo:rsid="003f8fac"/>
    </style:style>
    <style:style style:name="T6" style:family="text">
      <style:text-properties officeooo:rsid="00241660"/>
    </style:style>
    <style:style style:name="T7" style:family="text">
      <style:text-properties fo:font-weight="normal" style:font-weight-asian="normal" style:font-weight-complex="normal"/>
    </style:style>
    <style:style style:name="T8" style:family="text">
      <style:text-properties fo:font-weight="bold" officeooo:rsid="000f1f2b"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0f1f2b"/>
    </style:style>
    <style:style style:name="T11" style:family="text">
      <style:text-properties fo:font-weight="bold" officeooo:rsid="0025bdd1" style:font-weight-asian="bold" style:font-weight-complex="bold"/>
    </style:style>
    <style:style style:name="T12" style:family="text">
      <style:text-properties officeooo:rsid="001083e4"/>
    </style:style>
    <style:style style:name="T13" style:family="text">
      <style:text-properties fo:font-style="italic" officeooo:rsid="000f1f2b" style:font-style-asian="italic" style:font-style-complex="italic"/>
    </style:style>
    <style:style style:name="T14" style:family="text">
      <style:text-properties fo:font-style="italic" officeooo:rsid="001083e4" style:font-style-asian="italic" style:font-style-complex="italic"/>
    </style:style>
    <style:style style:name="T15" style:family="text">
      <style:text-properties fo:font-style="normal" officeooo:rsid="0010e03a" style:font-style-asian="normal" style:font-style-complex="normal"/>
    </style:style>
    <style:style style:name="T16" style:family="text">
      <style:text-properties fo:font-weight="bold" officeooo:rsid="00115ab5" style:font-weight-asian="bold"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weight="normal" officeooo:rsid="00463f1b" style:font-weight-asian="normal" style:font-weight-complex="normal"/>
    </style:style>
    <style:style style:name="T19" style:family="text">
      <style:text-properties fo:font-weight="bold" officeooo:rsid="0021de8c" style:font-weight-asian="bold" style:font-weight-complex="bold"/>
    </style:style>
    <style:style style:name="T20" style:family="text">
      <style:text-properties fo:font-weight="bold" officeooo:rsid="0012a1c4" style:font-weight-asian="bold" style:font-weight-complex="bold"/>
    </style:style>
    <style:style style:name="T21" style:family="text">
      <style:text-properties officeooo:rsid="0012a1c4"/>
    </style:style>
    <style:style style:name="T22" style:family="text">
      <style:text-properties officeooo:rsid="00146395"/>
    </style:style>
    <style:style style:name="T23" style:family="text">
      <style:text-properties officeooo:rsid="00513758"/>
    </style:style>
    <style:style style:name="T24" style:family="text">
      <style:text-properties fo:font-weight="normal" officeooo:rsid="0021de8c" style:font-weight-asian="normal" style:font-weight-complex="normal"/>
    </style:style>
    <style:style style:name="T25" style:family="text">
      <style:text-properties fo:font-weight="normal" officeooo:rsid="00549fdc" style:font-weight-asian="normal" style:font-weight-complex="normal"/>
    </style:style>
    <style:style style:name="T26" style:family="text">
      <style:text-properties officeooo:rsid="00167629"/>
    </style:style>
    <style:style style:name="T27" style:family="text">
      <style:text-properties fo:font-weight="normal" officeooo:rsid="00167629" style:font-weight-asian="normal" style:font-weight-complex="normal"/>
    </style:style>
    <style:style style:name="T28" style:family="text">
      <style:text-properties fo:font-weight="normal" officeooo:rsid="00185f38" style:font-weight-asian="normal" style:font-weight-complex="normal"/>
    </style:style>
    <style:style style:name="T29" style:family="text">
      <style:text-properties officeooo:rsid="00185f38"/>
    </style:style>
    <style:style style:name="T30" style:family="text">
      <style:text-properties fo:font-weight="normal" officeooo:rsid="001ce592" style:font-weight-asian="normal" style:font-weight-complex="normal"/>
    </style:style>
    <style:style style:name="T31" style:family="text">
      <style:text-properties fo:font-weight="bold" officeooo:rsid="00222abb" style:font-weight-asian="bold" style:font-weight-complex="bold"/>
    </style:style>
    <style:style style:name="T32" style:family="text">
      <style:text-properties officeooo:rsid="0018a8ba"/>
    </style:style>
    <style:style style:name="T33" style:family="text">
      <style:text-properties officeooo:rsid="0018aa3a"/>
    </style:style>
    <style:style style:name="T34" style:family="text">
      <style:text-properties fo:font-weight="bold" officeooo:rsid="002f9e03" style:font-weight-asian="bold" style:font-weight-complex="bold"/>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officeooo:rsid="00353578"/>
    </style:style>
    <style:style style:name="T37" style:family="text">
      <style:text-properties officeooo:rsid="003192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575in, 0in, 0.0638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SCO TACTICAL CONTROLLER GUIDE</text:p>
      <text:p text:style-name="P2"/>
      <text:p text:style-name="P3"/>
      <text:p text:style-name="P3">Hey there Motivator! From the creators of the CrayonEaters Series...</text:p>
      <text:p text:style-name="P3"/>
      <text:p text:style-name="P3"><text:span text:style-name="T1">Tired</text:span> of manually updating your routers and switches before every field op? <text:span text:style-name="T1">Feeling dumb</text:span> when you are typing the same commands on every device?</text:p>
      <text:p text:style-name="P3"/>
      <text:p text:style-name="P3">Don't worry, the <text:span text:style-name="T2">Cisco Tactical Controller</text:span> is here to save you some time and effort!</text:p>
      <text:p text:style-name="P3"/>
      <text:p text:style-name="P3"><text:span text:style-name="T1">No more bending</text:span> over to reach the console port of your LEM's switch. <text:span text:style-name="T1">No more finding</text:span> a console cable just to not have the drivers installed on your CM. <text:span text:style-name="T1">Enough Powershell scripts</text:span> that you don't even understand. Someone get a damn GUI!</text:p>
      <text:p text:style-name="P3"/>
      <text:p text:style-name="P3">And we got it, just fresh of the compiler for you. Lightweight, portable and easy to operate, this controller can run updates on INSTALL mode for many Cisco IOS-XE devices at once with just 2 clicks! Keep track of your devices on a nice EXCEL tracker organized by sheets for each scenario, and choose whether to push and retrieve data from devices, or run updates on them<text:span text:style-name="T3">. </text:span>Run <text:span text:style-name="T3">this app</text:span> <text:span text:style-name="T4">in</text:span> any MCEN laptop, <text:span text:style-name="T4">in</text:span> any CM, <text:span text:style-name="T4">in</text:span> your personal gaming computer,... anywhere, at any time, in any enclave.</text:p>
      <text:p text:style-name="P3"/>
      <text:p text:style-name="P3">In today's battlefield, DNAC is not tactical and ANSIBLE is impractical. Don't even think about T<text:span text:style-name="T5">ERRAFORM</text:span>. When you are in the middle of the jungle operating a LAN it is humid, it is hot, and suddenly DCO complains about the version of the switches being outdated, causing your leadership to crash out. The last you want to think about is HashiCorp language while your Gunny is yelling at you to get the updates done faster. Dominate this tactical tool and become part of the next generation of network administrators. Stop working hard, start working smart.</text:p>
      <text:p text:style-name="P3"/>
      <text:p text:style-name="P4"><draw:frame draw:style-name="fr1" draw:name="Image14" text:anchor-type="char" svg:x="1.2484in" svg:y="0.0772in" svg:width="4.6244in" svg:height="3.8445in" draw:z-index="13"><draw:image xlink:href="Pictures/100000010000024B000001E834B27B6A.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 Unzip the application folder.</text:p>
      <text:p text:style-name="P4"/>
      <text:p text:style-name="P4"><draw:frame draw:style-name="fr2" draw:name="Image7" text:anchor-type="char" svg:width="4.3453in" svg:height="2.4638in" draw:z-index="6"><draw:image xlink:href="Pictures/100000010000045000000272AAC3D83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 Open <text:span text:style-name="T6">the </text:span>EXCEL file inside the folder: <text:span text:style-name="T7">once we open the EXCEL file, we will see some samples of EXCEL sheets. These samples have been made so we can copy the tables and paste them on a new sheet with our custom parameters.</text:span></text:p>
      <text:p text:style-name="P5"/>
      <text:p text:style-name="P5"><draw:frame draw:style-name="fr1" draw:name="Image8" text:anchor-type="char" svg:x="1.8634in" svg:y="0in" svg:width="3.3728in" svg:height="1.1126in" draw:z-index="7"><draw:image xlink:href="Pictures/100000010000028F000000D8F5869DDB.png" xlink:type="simple" xlink:show="embed" xlink:actuate="onLoad" draw:mime-type="image/png"/></draw:frame></text:p>
      <text:p text:style-name="P5"/>
      <text:p text:style-name="P5"/>
      <text:p text:style-name="P5"/>
      <text:p text:style-name="P5"/>
      <text:p text:style-name="P5"/>
      <text:p text:style-name="P5"/>
      <text:p text:style-name="P5"/>
      <text:p text:style-name="P6"><text:span text:style-name="T8">3</text:span><text:span text:style-name="T1">. Create a new EXCEL sheet:</text:span> the best practice is to create a new EXCEL sheet and not reuse the sample ones. We can <text:span text:style-name="T6">name the</text:span> new sheet based on the site code, exercise, location, …</text:p>
      <text:p text:style-name="P6"><draw:frame draw:style-name="fr1" draw:name="Image2" text:anchor-type="char" svg:x="1.8591in" svg:y="0.1874in" svg:width="3.2681in" svg:height="3.3181in" draw:z-index="1"><draw:image xlink:href="Pictures/10000001000003DE000003EDC586C60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For example, a sheet called “<text:span text:style-name="T9">BK26”</text:span> may contain the data of the network devices of the exercise <text:span text:style-name="T9">Balikatan26</text:span>, and a sheet named “<text:span text:style-name="T9">DARWIN</text:span>” may be populated with the data of network devices located in Darwin, Australia.</text:p>
      <text:p text:style-name="P6"/>
      <text:p text:style-name="P6"/>
      <text:p text:style-name="P7"><text:span text:style-name="T8">4</text:span><text:span text:style-name="T1">. </text:span><text:span text:style-name="T8">OPTIONAL: </text:span><text:span text:style-name="T1">Copy one of the tables from the sample sheets to the new sheet:</text:span> <text:span text:style-name="T10">this tables have been crafted with conditional formatting rules that will color the cells in relation with their dynamic content. You can also create the table from scratch, but the </text:span><text:span text:style-name="T8">header names will </text:span><text:span text:style-name="T11">need </text:span><text:span text:style-name="T8">to match exactly the original ones</text:span><text:span text:style-name="T10">.</text:span></text:p>
      <text:p text:style-name="P7"/>
      <text:p text:style-name="P8"/>
      <text:p text:style-name="P9"><text:span text:style-name="T8">5</text:span><text:span text:style-name="T1">. </text:span><text:span text:style-name="T8">Populate the table with our network data:</text:span><text:span text:style-name="T10"> </text:span><text:span text:style-name="T12">this depends on the mode of the application that we choose to use:</text:span></text:p>
      <text:p text:style-name="P9"/>
      <text:p text:style-name="P9"><text:span text:style-name="T12">In</text:span><text:span text:style-name="T10"> </text:span><text:span text:style-name="T13">COMMAND PUSHER</text:span><text:span text:style-name="T10"> mode, we only need to fill the columns:</text:span></text:p>
      <text:p text:style-name="P7"/>
      <text:p text:style-name="P7">- <text:span text:style-name="T13">Hostname</text:span></text:p>
      <text:p text:style-name="P7">- <text:span text:style-name="T13">OOBM IP Address</text:span></text:p>
      <text:p text:style-name="P7">- <text:span text:style-name="T13">Model</text:span></text:p>
      <text:p text:style-name="P7"/>
      <text:p text:style-name="P9"><text:span text:style-name="T12">In</text:span><text:span text:style-name="T10"> </text:span><text:span text:style-name="T14">UPDATER</text:span><text:span text:style-name="T10"> mode, we need to fill the columns:</text:span></text:p>
      <text:p text:style-name="P9"/>
      <text:p text:style-name="P9">- <text:span text:style-name="T13">Hostname</text:span></text:p>
      <text:p text:style-name="P9">- <text:span text:style-name="T13">OOBM IP Address</text:span></text:p>
      <text:p text:style-name="P9">- <text:span text:style-name="T13">Model</text:span></text:p>
      <text:p text:style-name="P10">- <text:span text:style-name="T12">Recommended IOS Version </text:span><text:span text:style-name="T15">(the number of the new IOS version we want to install)</text:span></text:p>
      <text:p text:style-name="P9"/>
      <text:p text:style-name="P11">Remember that the ‘<text:span text:style-name="T9">Model</text:span>’ column value has to match EXACTLY the name of the folder in the “<text:span text:style-name="T9">ios_image_repository</text:span>” parent folder.</text:p>
      <text:p text:style-name="P3"/>
      <text:p text:style-name="P3"><draw:frame draw:style-name="fr1" draw:name="Image10" text:anchor-type="char" svg:x="0.1055in" svg:y="0in" svg:width="3.5543in" svg:height="1.4126in" draw:z-index="9"><draw:image xlink:href="Pictures/1000000100000231000000DF8339B09E.png" xlink:type="simple" xlink:show="embed" xlink:actuate="onLoad" draw:mime-type="image/png"/></draw:frame><draw:frame draw:style-name="fr3" draw:name="Image11" text:anchor-type="char" svg:x="3.7984in" svg:y="0.0138in" svg:width="3.1772in" svg:height="1.4319in" draw:z-index="10"><draw:image xlink:href="Pictures/1000000100000166000000AD8E8F53FE.png" xlink:type="simple" xlink:show="embed" xlink:actuate="onLoad" draw:mime-type="image/png"/></draw:frame></text:p>
      <text:p text:style-name="P3"/>
      <text:p text:style-name="P3"/>
      <text:p text:style-name="P12"/>
      <text:p text:style-name="P12"/>
      <text:p text:style-name="P12"/>
      <text:p text:style-name="P12"/>
      <text:p text:style-name="P12"/>
      <text:p text:style-name="P12"/>
      <text:p text:style-name="P12"/>
      <text:p text:style-name="P13"><text:span text:style-name="T16">6</text:span><text:span text:style-name="T1">. </text:span><text:span text:style-name="T16">Save the EXCEL file and close it.</text:span></text:p>
      <text:p text:style-name="P12"/>
      <text:p text:style-name="P14"/>
      <text:p text:style-name="P14"/>
      <text:p text:style-name="P14"/>
      <text:p text:style-name="P14"/>
      <text:p text:style-name="P14"/>
      <text:p text:style-name="P14"/>
      <text:p text:style-name="P14"><text:soft-page-break/>7. Only for UPDATER mode: <text:span text:style-name="T7">if we want to use UPDATER mode, we will need to download the IOS image files from Cisco Software Central and save the files in the correspondent folder under the “</text:span><text:span text:style-name="T17">ios_image_repository</text:span><text:span text:style-name="T7">” parent folder. </text:span><text:span text:style-name="T18">If the folder for the model does not exists, we can create it.</text:span></text:p>
      <text:p text:style-name="P15"/>
      <text:p text:style-name="P12"><draw:frame draw:style-name="fr2" draw:name="Image9" text:anchor-type="char" svg:width="4.5063in" svg:height="1.2165in" draw:z-index="8"><draw:image xlink:href="Pictures/10000001000002AD000000B9C554E9D6.png" xlink:type="simple" xlink:show="embed" xlink:actuate="onLoad" draw:mime-type="image/png"/></draw:frame></text:p>
      <text:p text:style-name="P12"/>
      <text:p text:style-name="P16"/>
      <text:p text:style-name="P16"/>
      <text:p text:style-name="P16"/>
      <text:p text:style-name="P16"/>
      <text:p text:style-name="P16"/>
      <text:p text:style-name="P16"/>
      <text:p text:style-name="P16"/>
      <text:p text:style-name="P17"><text:span text:style-name="T19">8</text:span><text:span text:style-name="T1">. </text:span><text:span text:style-name="T20">Open the application executable file: </text:span><text:span text:style-name="T21">simply double click on it and the GUI will pop up after a minute.</text:span></text:p>
      <text:p text:style-name="P17"/>
      <text:p text:style-name="P16"/>
      <text:p text:style-name="P16"><draw:frame draw:style-name="fr4" draw:name="Image12" text:anchor-type="char" svg:width="3.8598in" svg:height="1.2772in" draw:z-index="11"><draw:image xlink:href="Pictures/10000001000002A5000000E0DE200F74.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7"><text:span text:style-name="T19">9</text:span><text:span text:style-name="T1">. </text:span><text:span text:style-name="T20">Start using the app!</text:span><text:span text:style-name="T16"> </text:span><text:span text:style-name="T21">From here, everything is pretty intuitive. </text:span><text:span text:style-name="T22">We included an example of each mode. </text:span><text:span text:style-name="T23">To get started, we just need to type the EXCEL sheet name on the text box and click SHOW ELIGIBLE DEVICES.</text:span></text:p>
      <text:p text:style-name="P18"/>
      <text:p text:style-name="P18"><draw:frame draw:style-name="fr1" draw:name="Image13" text:anchor-type="char" svg:x="1.3244in" svg:y="0.0272in" svg:width="4.2764in" svg:height="3.1618in" draw:z-index="12"><draw:image xlink:href="Pictures/1000000100000404000002F8D95413E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OMMAND PUSHER EXAMPLE</text:p>
      <text:p text:style-name="P18">---------------------------------------------</text:p>
      <text:p text:style-name="P18"/>
      <text:p text:style-name="P18">First, we select the desired devices <text:span text:style-name="T24">by clicking their checkbox.</text:span><text:span text:style-name="T7"> Then, we click PUSH COMMANDS.</text:span></text:p>
      <text:p text:style-name="P18"/>
      <text:p text:style-name="P18"><draw:frame draw:style-name="fr2" draw:name="Image4" text:anchor-type="char" svg:width="4.9382in" svg:height="3.6583in" draw:z-index="3"><draw:image xlink:href="Pictures/1000000100000403000002F9E228199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Now we need to type the commands we want to push in the text box that pops up:</text:p>
      <text:p text:style-name="P18"/>
      <text:p text:style-name="P18"><draw:frame draw:style-name="fr2" draw:name="Image5" text:anchor-type="char" svg:width="2.2709in" svg:height="1.6043in" draw:z-index="4"><draw:image xlink:href="Pictures/10000001000000DA0000009A3EFD32E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Next we push the commands. <text:span text:style-name="T7">The output per device is available by clicking on each device’s name tab. The color represents the result of the push. A yellow or red color means that something went wrong, so we should check them to see what the issue is.</text:span></text:p>
      <text:p text:style-name="P18"/>
      <text:p text:style-name="P18">We can then click PUSH MORE to run more commands over the devices that we already selected, or we can close the window.</text:p>
      <text:p text:style-name="P18"/>
      <text:p text:style-name="P18"/>
      <text:p text:style-name="P18"/>
      <text:p text:style-name="P18"/>
      <text:p text:style-name="P18"/>
      <text:p text:style-name="P18"><text:soft-page-break/>UPDATER EXAMPLE</text:p>
      <text:p text:style-name="P18">------------------------------</text:p>
      <text:p text:style-name="P18"/>
      <text:p text:style-name="P19">First, we select the desired devices <text:span text:style-name="T25">by </text:span><text:span text:style-name="T24">clicking their checkbox.</text:span></text:p>
      <text:p text:style-name="P20"><draw:frame draw:style-name="fr5" draw:name="Image1" text:anchor-type="char" svg:x="1.1035in" svg:y="0.1846in" svg:width="4.5937in" svg:height="3.3882in" draw:z-index="0"><draw:image xlink:href="Pictures/1000000100000401000002F4935BAA2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Note that the devices shown in this mode are the ones that comply with all the additional requirements for this application mode (SCP enabled, RESTCONF enabled, IOS image file present in the correspondent folder, enough FLASH memory space, …) so if we are not seeing some expected device, we should check the EXCEL table’s dynamic columns to see which requirement is not being satisfied by such device.</text:p>
      <text:p text:style-name="P18"/>
      <text:p text:style-name="P21">Then, we click <text:span text:style-name="T26">START UPDATE and the entire INSTALL-MODE Upgrade process runs in an automated fashion.</text:span></text:p>
      <text:p text:style-name="P22"/>
      <text:p text:style-name="P21"><text:span text:style-name="T27">We can go get some Wing</text:span><text:span text:style-name="T28">S</text:span><text:span text:style-name="T27">top with fries and ranch and come back when the update is done. It </text:span><text:span text:style-name="T26">may take a whil</text:span><text:span text:style-name="T29">e </text:span><text:span text:style-name="T27">depending on the version, file sizes, … </text:span><text:span text:style-name="T30">We can also click CANCEL UPDATE if desired (only available during the SCP transfer). Be aware that canceling the update involves kicking every SSH session out of the device (clearing all VTY lines).</text:span></text:p>
      <text:p text:style-name="P23"/>
      <text:p text:style-name="P23"><draw:frame draw:style-name="fr2" draw:name="Image6" text:anchor-type="char" svg:width="4.3173in" svg:height="1.2264in" draw:z-index="5"><draw:image xlink:href="Pictures/10000001000004200000012CC6057B19.png" xlink:type="simple" xlink:show="embed" xlink:actuate="onLoad" draw:mime-type="image/png"/></draw:frame></text:p>
      <text:p text:style-name="P23"/>
      <text:p text:style-name="P23"/>
      <text:p text:style-name="P23"/>
      <text:p text:style-name="P23"/>
      <text:p text:style-name="P23"/>
      <text:p text:style-name="P23"/>
      <text:p text:style-name="P24">In case of errors, an error window will pop up. <text:span text:style-name="T1">D</text:span><text:span text:style-name="T31">o</text:span><text:span text:style-name="T1"> NOT open the EXCEL file during the upgrade time</text:span>, otherwise it will not be dynamically populated and we will not know <text:span text:style-name="T32">the results of each stage of the process for each device. </text:span><text:span text:style-name="T33">However, having the EXCEL file open will not stop the upgrade process.</text:span></text:p>
      <text:p text:style-name="P24"/>
      <text:p text:style-name="P25"><text:soft-page-break/><text:span text:style-name="T1">At the end of the </text:span><text:span text:style-name="T34">upgrade</text:span>, a summary window will be displayed with a count of the results. We should always open the EXCEL file and check the correspondent sheet to ensure that everything went as expected, and fix any errors that happened.</text:p>
      <text:p text:style-name="P25"/>
      <text:p text:style-name="P25"><draw:frame draw:style-name="fr2" draw:name="Image3" text:anchor-type="char" svg:width="4.9327in" svg:height="3.6417in" draw:z-index="2"><draw:image xlink:href="Pictures/1000000100000404000002F7F5CC469D.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For a more detailed output of the process, the <text:span text:style-name="T35">execution_logs.log</text:span> file contains the application logs, listing every step and action that is taken as well as the results of it.</text:p>
      <text:p text:style-name="P26"/>
      <text:p text:style-name="P27"/>
      <text:p text:style-name="P28"/>
      <text:p text:style-name="P28"/>
      <text:p text:style-name="P28"/>
      <text:p text:style-name="P28"/>
      <text:p text:style-name="P27"/>
      <text:p text:style-name="P27"/>
      <text:p text:style-name="P27"/>
      <text:p text:style-name="P27"/>
      <text:p text:style-name="P28"/>
      <text:p text:style-name="P28"/>
      <text:p text:style-name="P28"/>
      <text:p text:style-name="P28"/>
      <text:p text:style-name="P28">SUPPORT</text:p>
      <text:p text:style-name="P28">--------------</text:p>
      <text:p text:style-name="P27"/>
      <text:p text:style-name="P27">If this application is trash and you are about to throw your laptop to the dumpster, <text:span text:style-name="T1">contact me </text:span><text:span text:style-name="T36">first</text:span>:</text:p>
      <text:p text:style-name="P27"><text:s/></text:p>
      <text:p text:style-name="P27">- <text:span text:style-name="T1">Personal Email</text:span> (preferred): <text:a xlink:type="simple" xlink:href="mailto:juanbar066@gmail.com" text:style-name="Internet_20_link" text:visited-style-name="Visited_20_Internet_20_Link">juanbar066@gmail.com</text:a></text:p>
      <text:p text:style-name="P27">- Military Email: <text:a xlink:type="simple" xlink:href="mailto:juan.gonzalezescobar@usmc.mil" text:style-name="Internet_20_link" text:visited-style-name="Visited_20_Internet_20_Link">juan.gonzalezescobar@usmc.mil</text:a></text:p>
      <text:p text:style-name="P27">- <text:span text:style-name="T37">Work Email (only if my Exchange server is active): </text:span><text:a xlink:type="simple" xlink:href="mailto:juan.gonzalezescobar@escobarsroomlab.com" text:style-name="Internet_20_link" text:visited-style-name="Visited_20_Internet_20_Link"><text:span text:style-name="T37">juan.gonzalezescobar@escobarsroomlab.com</text:span></text:a></text:p>
      <text:p text:style-name="P27">- US Phone Number: 571-671-506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09T21:10:02.817650800</meta:creation-date>
    <dc:date>2026-05-10T01:40:46.314130700</dc:date>
    <meta:editing-duration>PT3H19M47S</meta:editing-duration>
    <meta:editing-cycles>66</meta:editing-cycles>
    <meta:generator>LibreOffice/25.8.5.2$Windows_X86_64 LibreOffice_project/9c8b85f387cc00a89945a79c9e6239f32e450ac2</meta:generator>
    <meta:print-date>2026-05-10T01:06:46.323431700</meta:print-date>
    <meta:printed-by>PDF files</meta:printed-by>
    <meta:document-statistic meta:table-count="0" meta:image-count="14" meta:object-count="0" meta:page-count="7" meta:paragraph-count="50" meta:word-count="1105" meta:character-count="6326" meta:non-whitespace-character-count="5269"/>
  </office:meta>
</office:document-meta>
</file>